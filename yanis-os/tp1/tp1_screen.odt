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6.3in" svg:height="3.74931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ounes Bendani</meta:initial-creator>
    <dc:creator>MAISONNEUVE Yanis</dc:creator>
    <meta:creation-date>2026-05-27T16:10:00Z</meta:creation-date>
    <dc:date>2026-05-28T23:11:00Z</dc: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