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Légende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2.3583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ounes Bendani</meta:initial-creator>
    <dc:creator>MAISONNEUVE Yanis</dc:creator>
    <meta:creation-date>2026-05-27T16:26:00Z</meta:creation-date>
    <dc:date>2026-05-28T23:30:00Z</dc:date>
    <meta:template xlink:href="Normal" xlink:type="simple"/>
    <meta:editing-cycles>3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